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m" svg:font-family="rem, 'Google Sans Text', 'Google Sans', sans-serif"/>
  </office:font-face-decls>
  <office:automatic-styles>
    <style:style style:name="Table1" style:family="table">
      <style:table-properties style:width="21.2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3.346cm"/>
    </style:style>
    <style:style style:name="Table1.C" style:family="table-column">
      <style:table-column-properties style:column-width="4.138cm"/>
    </style:style>
    <style:style style:name="Table1.D" style:family="table-column">
      <style:table-column-properties style:column-width="3.268cm"/>
    </style:style>
    <style:style style:name="Table1.E" style:family="table-column">
      <style:table-column-properties style:column-width="2.82cm"/>
    </style:style>
    <style:style style:name="Table1.F" style:family="table-column">
      <style:table-column-properties style:column-width="2.916cm"/>
    </style:style>
    <style:style style:name="Table1.G" style:family="table-column">
      <style:table-column-properties style:column-width="3.087cm"/>
    </style:style>
    <style:style style:name="Table1.1" style:family="table-row">
      <style:table-row-properties style:min-row-height="1.07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 officeooo:paragraph-rsid="000ce602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page"/>
      <style:text-properties fo:font-variant="normal" fo:text-transform="none" style:font-name="rem" fo:font-size="10.5pt" fo:letter-spacing="normal" fo:font-style="normal" fo:font-weight="normal" officeooo:paragraph-rsid="000ce60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normal" officeooo:paragraph-rsid="000ce602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 officeooo:rsid="000ce602" officeooo:paragraph-rsid="000ce602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 officeooo:rsid="000edc2e" officeooo:paragraph-rsid="000edc2e"/>
    </style:style>
    <style:style style:name="P9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style:font-name="rem" fo:font-size="10.5pt" fo:letter-spacing="normal" fo:font-style="normal" fo:font-weight="normal" loext:padding="0cm" loext:border="none"/>
    </style:style>
    <style:style style:name="P10" style:family="paragraph" style:parent-style-name="Standard">
      <style:text-properties fo:font-variant="normal" fo:text-transform="none" style:font-name="rem" fo:font-size="10.5pt" fo:letter-spacing="normal" fo:font-style="normal" fo:font-weight="normal" style:font-weight-asian="bold" style:font-weight-complex="bold"/>
    </style:style>
    <style:style style:name="P11" style:family="paragraph" style:parent-style-name="Standard">
      <style:text-properties fo:font-variant="normal" fo:text-transform="none" style:font-name="rem" fo:font-size="10.5pt" fo:letter-spacing="normal" fo:font-style="normal" fo:font-weight="normal" officeooo:paragraph-rsid="00101042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style:font-name="rem" fo:font-size="10.5pt" fo:letter-spacing="normal" fo:font-style="normal" fo:font-weight="normal" officeooo:paragraph-rsid="00101042" style:font-weight-asian="bold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15" style:family="paragraph" style:parent-style-name="Standard">
      <style:text-properties fo:font-variant="normal" fo:text-transform="none" style:font-name="rem" fo:font-size="10.5pt" fo:letter-spacing="normal" fo:font-style="normal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line-height="150%" fo:text-indent="0cm" style:auto-text-indent="false" fo:break-before="page"/>
      <style:text-properties fo:font-variant="normal" fo:text-transform="none" style:font-name="rem" fo:font-size="10.5pt" fo:letter-spacing="normal" fo:font-style="normal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letter-spacing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letter-spacing="normal"/>
    </style:style>
    <style:style style:name="P19" style:family="paragraph" style:parent-style-name="Standard">
      <style:text-properties fo:font-weight="bold" officeooo:rsid="000edc2e" officeooo:paragraph-rsid="000edc2e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officeooo:rsid="00101042" officeooo:paragraph-rsid="00101042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1042" officeooo:paragraph-rsid="00101042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6" style:family="paragraph" style:parent-style-name="Table_20_Heading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officeooo:rsid="000ce602"/>
    </style:style>
    <style:style style:name="T3" style:family="text">
      <style:text-properties fo:font-weight="bold" officeooo:rsid="000fa5f5"/>
    </style:style>
    <style:style style:name="T4" style:family="text">
      <style:text-properties officeooo:rsid="000edc2e"/>
    </style:style>
    <style:style style:name="T5" style:family="text">
      <style:text-properties fo:font-style="italic"/>
    </style:style>
    <style:style style:name="T6" style:family="text">
      <style:text-properties style:font-name="rem" fo:font-size="10.5pt" fo:font-style="normal" fo:font-weight="normal"/>
    </style:style>
    <style:style style:name="T7" style:family="text">
      <style:text-properties style:font-name="rem" fo:font-size="10.5pt" fo:font-style="normal" fo:font-weight="bold"/>
    </style:style>
    <style:style style:name="T8" style:family="text">
      <style:text-properties officeooo:rsid="000fa5f5"/>
    </style:style>
    <style:style style:name="T9" style:family="text">
      <style:text-properties officeooo:rsid="00101042"/>
    </style:style>
    <style:style style:name="T10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2. Computer Vision Models</text:span></text:p>
      <text:p text:style-name="P4"><text:span text:style-name="T2">2.1 </text:span><text:span text:style-name="T1">Zhou, Y., &amp; Deng, J. (2018). Survey of Face Detection on Low-Quality Images. IEEE Access:</text:span> </text:p>
      <text:p text:style-name="P4">This paper addresses the core problem of <text:span text:style-name="T1">face detection on low-quality images</text:span> characterized by distortions like blur, noise, and low contrast, which are common in practical surveillance systems but often ignored by models trained on high-quality benchmarks. The authors’ key technical contribution is a <text:span text:style-name="T1">comparative robustness analysis</text:span> between representative traditional hand-crafted detectors (Viola-Jones, HoG-SVM) and deep learning-based models (Faster R-CNN, S3FD). The study works by applying synthetic Gaussian blur, white noise, and reduced brightness/contrast to the <text:span text:style-name="T1">FDDB dataset</text:span> and measuring the resulting performance degradation using discrete ROC curves.</text:p>
      <text:p text:style-name="P2">The investigation highlights significant <text:span text:style-name="T1">robustness considerations</text:span>, revealing that even state-of-the-art deep learning models are not sufficiently resilient to heavy distortions, particularly high-intensity noise. Interestingly, the paper notes a distinction in <text:span text:style-name="T1">efficiency and scalability</text:span>: while traditional methods are fast enough for CPU-based real-time detection, they lack the adaptability of deep models; however, <text:span text:style-name="T1">scale-variant deep architectures</text:span> (like S3FD) demonstrate better resilience to blur by utilizing features from multiple network layers compared to scale-invariant models. This work is significant to modern computer vision as it <text:span text:style-name="T1">exposes the gap</text:span> between laboratory performance and real-world utility, inspiring the development of <text:span text:style-name="T1">quality-invariant detectors</text:span> essential for practical applications like autonomous surveillance.</text:p>
      <text:p text:style-name="Standard"/>
      <text:p text:style-name="P4"><text:span text:style-name="T2">2.2 </text:span><text:span text:style-name="T1">Ghari, B., Tourani, A., Shahbahrami, A., &amp; Gaydadjiev, G. (2024). Pedestrian Detection in Low-Light Conditions: A Comprehensive Survey. IEEE Access:</text:span></text:p>
      <text:p text:style-name="P4">This paper addresses the critical problem of <text:span text:style-name="T1">accurate and instant pedestrian detection under low-light and reduced visibility conditions</text:span>, which is essential for the safety of autonomous vehicles and surveillance systems. As the first survey exclusively dedicated to nocturnal detection, its key contribution is a systematic classification of 118 state-of-the-art papers into categories of <text:span text:style-name="T1">handcrafted features, deep learning, and hybrid approaches</text:span>, alongside a comprehensive taxonomy of 16 benchmarking datasets such as KAIST and NightOwls. The survey highlights that modern trends favor <text:span text:style-name="T1">deep learning-based image fusion</text:span>—specifically halfway fusion—which integrates complementary feature maps from visual and thermal sensors to overcome the limitations of unimodal sensors in the dark.</text:p>
      <text:p text:style-name="P2">The work emphasizes several <text:span text:style-name="T1">robustness considerations</text:span>, including noise suppression in thermal images, handling modality imbalances where one sensor dominates training, and resolving "position-shift" problems caused by physical misalignments between different cameras. <text:soft-page-break/>Regarding <text:span text:style-name="T1">efficiency</text:span>, the authors evaluate state-of-the-art models on inference speed, identifying high-performing architectures like MD and GAFF that achieve real-time latencies as low as 0.007 seconds per frame. This survey is significant to modern computer vision because it <text:span text:style-name="T1">bridges the gap between laboratory benchmarks and practical, large-scale applications</text:span> like fully autonomous driving, identifying unresolved challenges in domain adaptation and explainable AI (xAI) that are vital for public reliability and safety.</text:p>
      <text:p text:style-name="Standard"/>
      <text:p text:style-name="P4"><text:span text:style-name="T2">2.3 </text:span><text:span text:style-name="T1">Hashmi, K. A., Kallempudi, G., Stricker, D., &amp; Afzal, M. Z. (2023). FeatEnHancer: Enhancing Hierarchical Features for Object Detection and Beyond under Low-Light Vision. IEEE/CVF International Conference on Computer Vision (ICCV):</text:span></text:p>
      <text:p text:style-name="P4">This work addresses the problem of extracting useful visual cues for <text:span text:style-name="T1">downstream tasks in low-light environments</text:span>, where traditional image enhancement methods often improve human visual perception at the expense of corrupting critical machine-learning features like edges and textures. The key technical innovation is <text:span text:style-name="T1">FeatEnHancer</text:span>, a general-purpose, plug-and-play module that <text:span text:style-name="T1">jointly optimizes enhancement and downstream task objectives</text:span> using a task-related loss function rather than standard enhancement metrics. The model works by downsampling input images to create <text:span text:style-name="T1">multi-scale hierarchical representations</text:span>, which are processed through a <text:span text:style-name="T1">Feature Enhancement Network (FEN)</text:span> to enrich intra-scale semantics. High-resolution features are then fused using <text:span text:style-name="T1">Scale-aware Attentional Feature Aggregation (SAFA)</text:span>, while lower-resolution features are integrated via skip connections.</text:p>
      <text:p text:style-name="P2">The framework demonstrates significant <text:span text:style-name="T1">robustness to illumination disparity and harsh weather conditions</text:span> without requiring pre-training on synthetic datasets or high-quality image pairs. Regarding <text:span text:style-name="T1">efficiency</text:span>, SAFA utilizes a strategy that projects high-resolution features into smaller dimensions before applying multi-headed attention, which manages the computational load while maintaining a lightweight footprint of only <text:span text:style-name="T1">138K parameters</text:span>. This work is highly significant to modern computer vision because it represents the first method to fully exploit <text:span text:style-name="T1">multi-scale hierarchical features</text:span> for low-light scenarios that generalizes across diverse modalities—including <text:span text:style-name="T1">generic object detection, face detection, nighttime semantic segmentation, and video object detection</text:span>—consistently outperforming state-of-the-art specialized models.</text:p>
      <text:p text:style-name="Standard"/>
      <text:p text:style-name="P5"><text:span text:style-name="T2">2.4 </text:span><text:span text:style-name="T1">Qu, J., Liu, R. W., Gao, Y., Guo, Y., Zhu, F., &amp; Wang, F.-Y. (2023). Double Domain Guided Real-Time Low-Light Image Enhancement for Ultra-High-Definition Transportation Surveillance. IEEE Transactions on Intelligent Transportation Systems:</text:span></text:p>
      <text:p text:style-name="P6">This work addresses the critical challenge of enhancing <text:span text:style-name="T1">poor visibility</text:span> in images captured under low-light conditions, which typically suffer from noise interference and degraded edge features. The research is significant to modern deep learning as it effectively navigates the trade-off between <text:span text:style-name="T1">enhancement quality and computational efficiency</text:span>, particularly for ultra-high-definition (UHD/4K) data where traditional resizing leads to severe detail loss. By improving visibility while preserving structural cues, the model directly supports the accuracy of higher-level downstream tasks like object detection and scene segmentation in complex environments.</text:p>
      <text:p text:style-name="P3">Conceptually, the proposed <text:span text:style-name="T1">DDNet (Double Domain Guided Network)</text:span> operates through an encoder-decoder structure that bifurcates the enhancement task into two parallel domains: <text:span text:style-name="T1">color enhancement</text:span> and <text:span text:style-name="T1">gradient enhancement</text:span>. The technical innovation lies in the <text:span text:style-name="T1">Coarse Enhancement Module (CEM)</text:span> and the <text:span text:style-name="T1">LoG-based Gradient Enhancement Module (GEM)</text:span>, which utilize the <text:span text:style-name="T1">Laplacian of Gaussian (LoG)</text:span> operator to extract and restore edge features while remaining robust to noise. The system further employs <text:span text:style-name="T1">Self-calibrated Convolutions with Attention Modules (ScCAM)</text:span> to identify and prioritize valuable feature information without increasing computational overhead. Regarding efficiency, DDNet is designed for real-time applications, achieving a processing speed of over <text:span text:style-name="T1">35 FPS on 4K images</text:span>, ensuring that high-resolution structural details are maintained without the latency typically associated with deep learning-based UHD processing.</text:p>
      <text:p text:style-name="P3"/>
      <text:p text:style-name="P4"><text:span text:style-name="T2">2.5 </text:span><text:span text:style-name="T1">Tran, D. Q., et al. (2024). Low-Light Image Enhancement Framework for Improved Object Detection in Fisheye Lens Datasets. CVPR Workshops (CVPRW):</text:span></text:p>
      <text:p text:style-name="P4">This research addresses the <text:span text:style-name="T1">core problem</text:span> of achieving accurate <text:span text:style-name="T1">object detection in fisheye lens imagery</text:span>, which is traditionally hindered by <text:span text:style-name="T1">low-light conditions, extreme omnidirectional distortion, and motion blur</text:span>,,. The <text:span text:style-name="T1">key technical innovation</text:span> is a holistic <text:span text:style-name="T1">Low-Light Image Enhancement Framework</text:span> that integrates a transformer-based image restoration network (<text:span text:style-name="T1">NAFNet</text:span>) for deblurring and a generative model (<text:span text:style-name="T1">GSAD</text:span>) to convert nighttime scenes into <text:span text:style-name="T1">daytime-like representations</text:span>,,. Conceptually, the method works by <text:span text:style-name="T1">normalizing illumination variability</text:span> and enhancing feature clarity during preprocessing, followed by a <text:span text:style-name="T1">super-resolution post-processing</text:span> step using a Dual Aggregation Transformer (<text:span text:style-name="T1">DAT</text:span>) to upscale resolution before final detection via an <text:span text:style-name="T1">ensemble of state-of-the-art models</text:span> (Co-DETR, YOLOv8x, and YOLOv9e),,.</text:p>
      <text:p text:style-name="P2">The framework prioritizes <text:span text:style-name="T1">robustness</text:span> by specifically mitigating the <text:span text:style-name="T1">small, blurry object </text:span><text:soft-page-break/><text:span text:style-name="T1">signatures</text:span> at the edges of fisheye scenes and the high signal-to-noise ratio typical of nocturnal environments,,. For <text:span text:style-name="T1">efficiency and scalability</text:span>, the authors leverage <text:span text:style-name="T1">real-time single-stage detectors</text:span> and demonstrate that a single fisheye lens, when properly enhanced, can provide a <text:span text:style-name="T1">cost-effective alternative</text:span> to multiple static, narrow-field-of-view cameras,,. This work is <text:span text:style-name="T1">significant</text:span> to modern computer vision as it provides a tangible methodology for deploying <text:span text:style-name="T1">intelligent transportation systems</text:span> in complex, dynamic urban environments, proving its effectiveness by ranking 5th in the 2024 AI City Challenge.</text:p>
      <text:p text:style-name="P8"/>
      <text:p text:style-name="P8"><text:span text:style-name="T1">2.6. Tan, M., Pang, R., &amp; Le, Q. V. (2020). EfficientDet: Scalable and Efficient Object Detection. Proceedings of the IEEE/CVF Conference on Computer Vision and Pattern Recognition (CVPR):</text:span></text:p>
      <text:p text:style-name="P8">This work addresses the <text:span text:style-name="T1">core problem of model efficiency and scalability</text:span> in object detection, noting that existing state-of-the-art models are often prohibitively expensive for real-world applications where model size and latency are highly constrained. The key technical innovation is the <text:span text:style-name="T1">Weighted Bi-directional Feature Pyramid Network (BiFPN)</text:span>, which enables fast multi-scale feature fusion, and a <text:span text:style-name="T1">compound scaling method</text:span> that uniformly scales the resolution, depth, and width of the backbone, feature network, and prediction networks simultaneously. The model works by using <text:span text:style-name="T1">EfficientNet backbones</text:span> and a BiFPN that introduces <text:span text:style-name="T1">learnable weights</text:span> to understand the importance of different input features while repeatedly applying top-down and bottom-up multi-scale fusion.</text:p>
      <text:p text:style-name="P2">This work is significant to modern computer vision because it provides a <text:span text:style-name="T1">principled and scalable architecture</text:span> that can be optimized for a wide spectrum of resource constraints, from mobile devices to data centers. Regarding <text:span text:style-name="T1">efficiency and scalability</text:span>, EfficientDet-D7 achieved state-of-the-art accuracy on the COCO dataset while being <text:span text:style-name="T1">4x to 9x smaller</text:span> and using <text:span text:style-name="T1">13x to 42x fewer FLOPs</text:span> than previous detectors. While the paper primarily focuses on architectural efficiency rather than specific environmental distortions, its <text:span text:style-name="T1">robust multi-scale feature representations</text:span> allow it to effectively process objects at varying resolutions, outperforming models like YOLOv3 and RetinaNet by being up to <text:span text:style-name="T1">8x faster on CPU</text:span>. These advancements make it a foundational baseline for creating highly accurate yet practical deep learning systems.</text:p>
      <text:p text:style-name="P8"/>
      <text:p text:style-name="P2"/>
      <text:p text:style-name="P16"><text:span text:style-name="T8">2.7 </text:span>Li, C., Guo, C., Han, L., Jiang, J., Cheng, M.-M., Gu, J., &amp; Loy, C. C. (2021). Low-Light Image and Video Enhancement Using Deep Learning: A Survey. <text:span text:style-name="T5">IEEE Transactions on Pattern Analysis and Machine Intelligence (TPAMI):</text:span></text:p>
      <text:p text:style-name="P2">This work addresses the challenge of <text:span text:style-name="T1">low-light image enhancement (LLIE)</text:span>, aiming to improve the aesthetic quality, perception, and interpretability of images and videos captured in poorly illuminated environments. Such data typically suffer from <text:span text:style-name="T1">buried scene content, low contrast, and boosted noise</text:span>, which significantly degrade the performance of high-level computer vision tasks like object detection and tracking.</text:p>
      <text:p text:style-name="P2">The survey’s primary contribution is a <text:span text:style-name="T1">systematic taxonomy of over 100 deep learning-based LLIE solutions</text:span> published between 2017 and 2021, providing a milestone of algorithmic evolution. Additionally, the authors propose the <text:span text:style-name="T1">LLIV-Phone dataset</text:span>, the largest of its kind with 45,148 images from 18 different mobile devices, and a <text:span text:style-name="T1">unified online platform</text:span> for assessing and comparing various LLIE methods.</text:p>
      <text:p text:style-name="P2">The authors provide a common formulation for LLIE, modeling the enhancement process through trainable network parameters optimized via <text:span text:style-name="T1">diverse learning strategies</text:span>. They categorize these strategies into supervised, unsupervised, zero-shot, reinforcement, and semi-supervised learning, while also evaluating different <text:span text:style-name="T1">loss functions</text:span> (e.g., reconstruction, perceptual, and smoothness) and <text:span text:style-name="T1">network architectures</text:span> such as U-Net and pyramid structures.</text:p>
      <text:p text:style-name="P2">The work highlights major <text:span text:style-name="T1">robustness gaps</text:span>, noting that models trained on synthetic data often fail to generalize to <text:span text:style-name="T1">real-world "unknown" noise</text:span> and artifacts. It specifically explores the ability of models to handle <text:span text:style-name="T1">uneven illumination and semantic region preservation</text:span>, where a model must distinguish between naturally dark objects (like black hair) and regions obscured by poor lighting.</text:p>
      <text:p text:style-name="P2">Models are evaluated and ranked based on <text:span text:style-name="T1">computational complexity</text:span>, specifically measuring <text:span text:style-name="T1">runtime, number of trainable parameters, and FLOPs</text:span>. The survey identifies that <text:span text:style-name="T1">lightweight architectures</text:span>—particularly curve-based estimation networks like Zero-DCE—achieve the fastest inference speeds, making them the most viable for real-time mobile and surveillance applications.</text:p>
      <text:p text:style-name="P2">This survey is significant because it provides the first <text:span text:style-name="T1">standardized benchmarking</text:span> for LLIE that balances human visual perception with machine vision requirements. By validating models through application-based evaluations like <text:span text:style-name="T1">face detection in the dark</text:span>, it establishes LLIE as a necessary preprocessing foundation for improving the reliability of autonomous driving and intelligent surveillance systems in adverse environments.</text:p>
      <text:p text:style-name="Standard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6"><text:span text:style-name="Strong_20_Emphasis"><text:span text:style-name="T10">Author &amp; Year</text:span></text:span></text:p>
          </table:table-cell>
          <table:table-cell table:style-name="Table1.A1" office:value-type="string">
            <text:p text:style-name="P26"><text:span text:style-name="Strong_20_Emphasis"><text:span text:style-name="T10">Model or Technique Type</text:span></text:span></text:p>
          </table:table-cell>
          <table:table-cell table:style-name="Table1.A1" office:value-type="string">
            <text:p text:style-name="P26"><text:span text:style-name="Strong_20_Emphasis"><text:span text:style-name="T10">Core Problem Addressed</text:span></text:span></text:p>
          </table:table-cell>
          <table:table-cell table:style-name="Table1.A1" office:value-type="string">
            <text:p text:style-name="P26"><text:span text:style-name="Strong_20_Emphasis"><text:span text:style-name="T10">Key Innovation</text:span></text:span></text:p>
          </table:table-cell>
          <table:table-cell table:style-name="Table1.A1" office:value-type="string">
            <text:p text:style-name="P26"><text:span text:style-name="Strong_20_Emphasis"><text:span text:style-name="T10">Robustness Strategy</text:span></text:span></text:p>
          </table:table-cell>
          <table:table-cell table:style-name="Table1.A1" office:value-type="string">
            <text:p text:style-name="P26"><text:span text:style-name="Strong_20_Emphasis"><text:span text:style-name="T10">Computational Efficiency Considerations</text:span></text:span></text:p>
          </table:table-cell>
          <table:table-cell table:style-name="Table1.A1" office:value-type="string">
            <text:p text:style-name="P26"><text:span text:style-name="Strong_20_Emphasis"><text:span text:style-name="T10">Relevance to Real-Time or Edge Systems</text:span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Li et al. (2021)</text:span></text:span></text:p>
          </table:table-cell>
          <table:table-cell table:style-name="Table1.A1" office:value-type="string">
            <text:p text:style-name="P23"><text:span text:style-name="Strong_20_Emphasis"><text:span text:style-name="T10">Survey</text:span></text:span><text:span text:style-name="T10"> of Deep Learning-based LLIE solutions</text:span></text:p>
          </table:table-cell>
          <table:table-cell table:style-name="Table1.A1" office:value-type="string">
            <text:p text:style-name="P25">Challenges in low-light image enhancement (LLIE) for content visibility and high-level tasks</text:p>
          </table:table-cell>
          <table:table-cell table:style-name="Table1.A1" office:value-type="string">
            <text:p text:style-name="P23"><text:span text:style-name="Strong_20_Emphasis"><text:span text:style-name="T10">Systematic taxonomy</text:span></text:span><text:span text:style-name="T10"> of 100+ LLIE methods and the proposal of the </text:span><text:span text:style-name="Strong_20_Emphasis"><text:span text:style-name="T10">LLIV-Phone dataset</text:span></text:span></text:p>
          </table:table-cell>
          <table:table-cell table:style-name="Table1.A1" office:value-type="string">
            <text:p text:style-name="P23"><text:span text:style-name="T10">Handling </text:span><text:span text:style-name="Strong_20_Emphasis"><text:span text:style-name="T10">real-world "unknown" noise</text:span></text:span><text:span text:style-name="T10"> and uneven illumination</text:span></text:p>
          </table:table-cell>
          <table:table-cell table:style-name="Table1.A1" office:value-type="string">
            <text:p text:style-name="P23"><text:span text:style-name="T10">Ranks models by </text:span><text:span text:style-name="Strong_20_Emphasis"><text:span text:style-name="T10">runtime, trainable parameters, and FLOPs</text:span></text:span></text:p>
          </table:table-cell>
          <table:table-cell table:style-name="Table1.A1" office:value-type="string">
            <text:p text:style-name="P23"><text:span text:style-name="T10">Identifies </text:span><text:span text:style-name="Strong_20_Emphasis"><text:span text:style-name="T10">lightweight architectures</text:span></text:span><text:span text:style-name="T10"> (e.g., Zero-DCE) as viable for real-time mobile use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Zhou &amp; Deng (2018)</text:span></text:span></text:p>
          </table:table-cell>
          <table:table-cell table:style-name="Table1.A1" office:value-type="string">
            <text:p text:style-name="P23"><text:span text:style-name="Strong_20_Emphasis"><text:span text:style-name="T10">Survey</text:span></text:span><text:span text:style-name="T10"> and robustness investigation</text:span></text:p>
          </table:table-cell>
          <table:table-cell table:style-name="Table1.A1" office:value-type="string">
            <text:p text:style-name="P23"><text:span text:style-name="Strong_20_Emphasis"><text:span text:style-name="T10">Face detection</text:span></text:span><text:span text:style-name="T10"> performance degradation on low-quality images</text:span></text:p>
          </table:table-cell>
          <table:table-cell table:style-name="Table1.A1" office:value-type="string">
            <text:p text:style-name="P23"><text:span text:style-name="T10">Comparative analysis of </text:span><text:span text:style-name="Strong_20_Emphasis"><text:span text:style-name="T10">design protocols</text:span></text:span><text:span text:style-name="T10"> between hand-crafted and deep-learning face detectors</text:span></text:p>
          </table:table-cell>
          <table:table-cell table:style-name="Table1.A1" office:value-type="string">
            <text:p text:style-name="P23"><text:span text:style-name="T10">Testing resilience against synthetic </text:span><text:span text:style-name="Strong_20_Emphasis"><text:span text:style-name="T10">Gaussian blur, white noise,</text:span></text:span><text:span text:style-name="T10"> and reduced contrast</text:span></text:p>
          </table:table-cell>
          <table:table-cell table:style-name="Table1.A1" office:value-type="string">
            <text:p text:style-name="P23"><text:span text:style-name="T10">Hand-crafted models are fast on CPUs; </text:span><text:span text:style-name="Strong_20_Emphasis"><text:span text:style-name="T10">scale-variant deep models</text:span></text:span><text:span text:style-name="T10"> show better resilience</text:span></text:p>
          </table:table-cell>
          <table:table-cell table:style-name="Table1.A1" office:value-type="string">
            <text:p text:style-name="P23"><text:span text:style-name="T10">Exposes the gap between laboratory benchmarks and </text:span><text:span text:style-name="Strong_20_Emphasis"><text:span text:style-name="T10">practical surveillance utility</text:span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Ghari et al. (2024)</text:span></text:span></text:p>
          </table:table-cell>
          <table:table-cell table:style-name="Table1.A1" office:value-type="string">
            <text:p text:style-name="P23"><text:span text:style-name="Strong_20_Emphasis"><text:span text:style-name="T10">Survey</text:span></text:span><text:span text:style-name="T10"> of nighttime pedestrian detection</text:span></text:p>
          </table:table-cell>
          <table:table-cell table:style-name="Table1.A1" office:value-type="string">
            <text:p text:style-name="P23"><text:span text:style-name="T10">Accurate and instant </text:span><text:span text:style-name="Strong_20_Emphasis"><text:span text:style-name="T10">pedestrian detection</text:span></text:span><text:span text:style-name="T10"> in low-light/reduced visibility</text:span></text:p>
          </table:table-cell>
          <table:table-cell table:style-name="Table1.A1" office:value-type="string">
            <text:p text:style-name="P23"><text:span text:style-name="T10">Systematic classification of 118 papers; emphasis on </text:span><text:span text:style-name="Strong_20_Emphasis"><text:span text:style-name="T10">deep learning-based image fusion</text:span></text:span></text:p>
          </table:table-cell>
          <table:table-cell table:style-name="Table1.A1" office:value-type="string">
            <text:p text:style-name="P23"><text:span text:style-name="T10">Integration of complementary feature maps via </text:span><text:span text:style-name="Strong_20_Emphasis"><text:span text:style-name="T10">multi-spectral fusion</text:span></text:span><text:span text:style-name="T10"> (visual + thermal)</text:span></text:p>
          </table:table-cell>
          <table:table-cell table:style-name="Table1.A1" office:value-type="string">
            <text:p text:style-name="P23"><text:span text:style-name="T10">Analysis of </text:span><text:span text:style-name="Strong_20_Emphasis"><text:span text:style-name="T10">inference time, memory consumption,</text:span></text:span><text:span text:style-name="T10"> and FLOPS</text:span></text:p>
          </table:table-cell>
          <table:table-cell table:style-name="Table1.A1" office:value-type="string">
            <text:p text:style-name="P23"><text:span text:style-name="T10">Identifies models achieving latencies as low as </text:span><text:span text:style-name="Strong_20_Emphasis"><text:span text:style-name="T10">0.007s per frame</text:span></text:span><text:span text:style-name="T10"> for autonomous vehicle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Hashmi et al. (2023)</text:span></text:span></text:p>
          </table:table-cell>
          <table:table-cell table:style-name="Table1.A1" office:value-type="string">
            <text:p text:style-name="P23"><text:span text:style-name="T10">Plug-and-play </text:span><text:span text:style-name="Strong_20_Emphasis"><text:span text:style-name="T10">Feature Enhancement Module</text:span></text:span></text:p>
          </table:table-cell>
          <table:table-cell table:style-name="Table1.A1" office:value-type="string">
            <text:p text:style-name="P23"><text:span text:style-name="T10">Visual cue extraction for </text:span><text:span text:style-name="Strong_20_Emphasis"><text:span text:style-name="T10">downstream tasks</text:span></text:span><text:span text:style-name="T10"> (detection, segmentation) in the dark</text:span></text:p>
          </table:table-cell>
          <table:table-cell table:style-name="Table1.A1" office:value-type="string">
            <text:p text:style-name="P23"><text:span text:style-name="Strong_20_Emphasis"><text:span text:style-name="T10">FeatEnHancer</text:span></text:span><text:span text:style-name="T10">: hierarchically combining multi-scale features using </text:span><text:span text:style-name="Strong_20_Emphasis"><text:span text:style-name="T10">multi-headed attention</text:span></text:span></text:p>
          </table:table-cell>
          <table:table-cell table:style-name="Table1.A1" office:value-type="string">
            <text:p text:style-name="P23"><text:span text:style-name="T10">Joint optimization using </text:span><text:span text:style-name="Strong_20_Emphasis"><text:span text:style-name="T10">task-related loss</text:span></text:span><text:span text:style-name="T10"> rather than visual enhancement metrics</text:span></text:p>
          </table:table-cell>
          <table:table-cell table:style-name="Table1.A1" office:value-type="string">
            <text:p text:style-name="P23"><text:span text:style-name="T10">Lightweight footprint of only </text:span><text:span text:style-name="Strong_20_Emphasis"><text:span text:style-name="T10">138K parameters</text:span></text:span></text:p>
          </table:table-cell>
          <table:table-cell table:style-name="Table1.A1" office:value-type="string">
            <text:p text:style-name="P23"><text:span text:style-name="T10">General-purpose module applicable to </text:span><text:span text:style-name="Strong_20_Emphasis"><text:span text:style-name="T10">generic object detection</text:span></text:span><text:span text:style-name="T10"> and segmentation pipeline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Qu et al. (2023)</text:span></text:span></text:p>
          </table:table-cell>
          <table:table-cell table:style-name="Table1.A1" office:value-type="string">
            <text:p text:style-name="P23"><text:span text:style-name="T10">Real-time </text:span><text:span text:style-name="Strong_20_Emphasis"><text:span text:style-name="T10">Encoder-Decoder Network</text:span></text:span><text:span text:style-name="T10"> (DDNet)</text:span></text:p>
          </table:table-cell>
          <table:table-cell table:style-name="Table1.A1" office:value-type="string">
            <text:p text:style-name="P23"><text:span text:style-name="T10">Poor visibility and noise in </text:span><text:span text:style-name="Strong_20_Emphasis"><text:span text:style-name="T10">Ultra-High-Definition (UHD/4K)</text:span></text:span><text:span text:style-name="T10"> surveillance</text:span></text:p>
          </table:table-cell>
          <table:table-cell table:style-name="Table1.A1" office:value-type="string">
            <text:p text:style-name="P23"><text:span text:style-name="T10">Bifurcated enhancement in parallel </text:span><text:span text:style-name="Strong_20_Emphasis"><text:span text:style-name="T10">color and gradient domains</text:span></text:span></text:p>
          </table:table-cell>
          <table:table-cell table:style-name="Table1.A1" office:value-type="string">
            <text:p text:style-name="P23"><text:span text:style-name="Strong_20_Emphasis"><text:span text:style-name="T10">LoG-based Gradient Enhancement Module</text:span></text:span><text:span text:style-name="T10"> (GEM) to restore edge features</text:span></text:p>
          </table:table-cell>
          <table:table-cell table:style-name="Table1.A1" office:value-type="string">
            <text:p text:style-name="P23"><text:span text:style-name="T10">Supports processing speeds of over </text:span><text:span text:style-name="Strong_20_Emphasis"><text:span text:style-name="T10">35 FPS on 4K images</text:span></text:span></text:p>
          </table:table-cell>
          <table:table-cell table:style-name="Table1.A1" office:value-type="string">
            <text:p text:style-name="P23"><text:span text:style-name="T10">Specifically designed for </text:span><text:span text:style-name="Strong_20_Emphasis"><text:span text:style-name="T10">real-time intelligent transportation systems</text:span></text:span><text:span text:style-name="T10"> (ITS)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Tran et al. (2024)</text:span></text:span></text:p>
          </table:table-cell>
          <table:table-cell table:style-name="Table1.A1" office:value-type="string">
            <text:p text:style-name="P23"><text:span text:style-name="T10">Multi-stage </text:span><text:span text:style-name="Strong_20_Emphasis"><text:span text:style-name="T10">Enhancement Framework</text:span></text:span></text:p>
          </table:table-cell>
          <table:table-cell table:style-name="Table1.A1" office:value-type="string">
            <text:p text:style-name="P23"><text:span text:style-name="T10">Object detection in </text:span><text:span text:style-name="Strong_20_Emphasis"><text:span text:style-name="T10">fisheye lens imagery</text:span></text:span><text:span text:style-name="T10"> with extreme distortion and low-light</text:span></text:p>
          </table:table-cell>
          <table:table-cell table:style-name="Table1.A1" office:value-type="string">
            <text:p text:style-name="P23"><text:span text:style-name="T10">Integration of </text:span><text:span text:style-name="Strong_20_Emphasis"><text:span text:style-name="T10">NAFNet (deblurring), GSAD (translation),</text:span></text:span><text:span text:style-name="T10"> and </text:span><text:span text:style-name="Strong_20_Emphasis"><text:span text:style-name="T10">DAT (super-resolution)</text:span></text:span></text:p>
          </table:table-cell>
          <table:table-cell table:style-name="Table1.A1" office:value-type="string">
            <text:p text:style-name="P23"><text:span text:style-name="T10">Robust detection via </text:span><text:span text:style-name="Strong_20_Emphasis"><text:span text:style-name="T10">ensemble learning</text:span></text:span><text:span text:style-name="T10"> (Co-DETR, YOLOv8x, YOLOv9e)</text:span></text:p>
          </table:table-cell>
          <table:table-cell table:style-name="Table1.A1" office:value-type="string">
            <text:p text:style-name="P23"><text:span text:style-name="T10">Employs </text:span><text:span text:style-name="Strong_20_Emphasis"><text:span text:style-name="T10">single-stage YOLO detectors</text:span></text:span><text:span text:style-name="T10"> to balance accuracy and speed</text:span></text:p>
          </table:table-cell>
          <table:table-cell table:style-name="Table1.A1" office:value-type="string">
            <text:p text:style-name="P23"><text:span text:style-name="T10">Proven robust by ranking 5th in the </text:span><text:span text:style-name="Strong_20_Emphasis"><text:span text:style-name="T10">2024 AI City Challenge</text:span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Strong_20_Emphasis"><text:span text:style-name="T10">Tan et al. (2020)</text:span></text:span></text:p>
          </table:table-cell>
          <table:table-cell table:style-name="Table1.A1" office:value-type="string">
            <text:p text:style-name="P23"><text:span text:style-name="T10">Scalable </text:span><text:span text:style-name="Strong_20_Emphasis"><text:span text:style-name="T10">Object Detection Model</text:span></text:span><text:span text:style-name="T10"> (EfficientDet)</text:span></text:p>
          </table:table-cell>
          <table:table-cell table:style-name="Table1.A1" office:value-type="string">
            <text:p text:style-name="P23"><text:span text:style-name="T10">Improving </text:span><text:span text:style-name="Strong_20_Emphasis"><text:span text:style-name="T10">model efficiency</text:span></text:span><text:span text:style-name="T10"> across wide-ranging resource constraints</text:span></text:p>
          </table:table-cell>
          <table:table-cell table:style-name="Table1.A1" office:value-type="string">
            <text:p text:style-name="P23"><text:span text:style-name="Strong_20_Emphasis"><text:span text:style-name="T10">Weighted Bi-directional Feature Pyramid Network</text:span></text:span><text:span text:style-name="T10"> (BiFPN) and compound scaling</text:span></text:p>
          </table:table-cell>
          <table:table-cell table:style-name="Table1.A1" office:value-type="string">
            <text:p text:style-name="P23"><text:span text:style-name="Strong_20_Emphasis"><text:span text:style-name="T10">Robust multi-scale feature fusion</text:span></text:span><text:span text:style-name="T10"> for handling varied object resolutions</text:span></text:p>
          </table:table-cell>
          <table:table-cell table:style-name="Table1.A1" office:value-type="string">
            <text:p text:style-name="P23"><text:span text:style-name="T10">Achieves state-of-the-art accuracy with </text:span><text:span text:style-name="Strong_20_Emphasis"><text:span text:style-name="T10">up to 42x fewer FLOPs</text:span></text:span><text:span text:style-name="T10"> than competitors</text:span></text:p>
          </table:table-cell>
          <table:table-cell table:style-name="Table1.A1" office:value-type="string">
            <text:p text:style-name="P23"><text:span text:style-name="T10">Principled scaling allows deployment on both </text:span><text:span text:style-name="Strong_20_Emphasis"><text:span text:style-name="T10">mobile/edge devices</text:span></text:span><text:span text:style-name="T10"> and data centers</text:span></text:p>
          </table:table-cell>
        </table:table-row>
      </table:table>
      <text:p text:style-name="P22"/>
      <text:h text:style-name="P1" text:outline-level="3">3.0 Face / Security / Behavior Analysis</text:h>
      <text:p text:style-name="P19"/>
      <text:p text:style-name="P15"><text:span text:style-name="T9">3.1 </text:span>Abu Awwad, Y., Rana, O., &amp; Perera, C. (2024). Anomaly Detection on the Edge Using Smart Cameras under Low-Light Conditions. Sensors, 24(3): </text:p>
      <text:p text:style-name="P3"><text:span text:style-name="T1">1. Full Citation Details</text:span> Abu Awwad, Y., Rana, O., &amp; Perera, C. (2024). <text:span text:style-name="T1">Anomaly Detection on the Edge Using Smart Cameras under Low-Light Conditions</text:span>. <text:span text:style-name="T5">Sensors</text:span>, 24(3), 772.</text:p>
      <text:p text:style-name="P3"><text:span text:style-name="T1">2. Specific Security or Surveillance Problem Addressed</text:span> The study addresses the difficulty of achieving efficient <text:span text:style-name="T1">anomaly detection in outdoor urban and rural environments</text:span>—such as farms and forests—where low-light conditions and poor visibility hinder the recognition of behaviors related to machinery and livestock theft or worker safety. Traditional systems struggle in these environments because low illumination introduces <text:span text:style-name="T1">noise and artifacts</text:span> that negatively impact the performance of object detection algorithms.</text:p>
      <text:p text:style-name="P3"><text:span text:style-name="T1">3. Background and Context</text:span> Historically, surveillance has relied on <text:span text:style-name="T1">Closed-Circuit Television (CCTV)</text:span> and cloud-based infrastructures to store and analyze data. However, transmitting high volumes of video to the cloud entails heavy network workloads, accounting for a significant portion of network traffic, and introduces issues regarding <text:span text:style-name="T1">latency, bandwidth limitations, and privacy</text:span>. While edge computing brings resources closer to the data source, performing complex video analytics on resource-constrained devices remains a significant hurdle.</text:p>
      <text:p text:style-name="P3"><text:span text:style-name="T1">4. Authors’ Stated Motivation</text:span> The authors identified a <text:span text:style-name="T1">gap in prior research</text:span> where anomaly detection models were predominantly trained and evaluated on high-quality datasets captured under ideal lighting conditions. These models often perform poorly in real-world nocturnal scenarios where images are contaminated with noise, leading to high <text:span text:style-name="T1">false-positive rates</text:span> in critical security applications.</text:p>
      <text:p text:style-name="P14">5. Specific Objectives</text:p>
      <text:p text:style-name="P18">• <text:span text:style-name="T6">To develop an </text:span><text:span text:style-name="T7">image enhancement technique</text:span><text:span text:style-name="T6"> specifically for object detection on edge nodes.</text:span></text:p>
      <text:p text:style-name="P18">• <text:span text:style-name="T6">To create a </text:span><text:span text:style-name="T7">lightweight dynamic classifier</text:span><text:span text:style-name="T6"> that selects the optimal enhancement network based on local and global image features.</text:span></text:p>
      <text:p text:style-name="P18">• <text:span text:style-name="T6">To demonstrate a </text:span><text:span text:style-name="T7">self-sufficient, edge-only proof-of-concept</text:span><text:span text:style-name="T6"> that maintains low latency and high accuracy on constrained hardware.</text:span></text:p>
      <text:p text:style-name="P14">6. Methodology Details</text:p>
      <text:p text:style-name="P18">• <text:span text:style-name="T7">Detection Tasks:</text:span><text:span text:style-name="T6"> The system performs </text:span><text:span text:style-name="T7">object detection</text:span><text:span text:style-name="T6"> to identify instances of people, cars, buses, and motorcycles as indicators of anomalous events.</text:span></text:p>
      <text:p text:style-name="P18">• <text:span text:style-name="T7">Deep Learning Architectures:</text:span><text:span text:style-name="T6"> The system utilizes a </text:span><text:span text:style-name="T7">Random Forest algorithm</text:span><text:span text:style-name="T6"> for the dynamic classifier, </text:span><text:span text:style-name="T7">RUAS and Zero-DCE++</text:span><text:span text:style-name="T6"> for low-light enhancement, and </text:span><text:span text:style-name="T7">YOLOv5-tiny</text:span><text:span text:style-name="T6"> </text:span><text:soft-page-break/><text:span text:style-name="T6">(integrated with Intel Neural Computing Stick 2) for edge-based detection, with </text:span><text:span text:style-name="T7">Detectron2</text:span><text:span text:style-name="T6"> serving as a cloud-based baseline.</text:span></text:p>
      <text:p text:style-name="P18">• <text:span text:style-name="T7">Temporal/Motion Information:</text:span><text:span text:style-name="T6"> The process is triggered by a </text:span><text:span text:style-name="T7">"pre-identify signal"</text:span><text:span text:style-name="T6"> from a smart camera, which prompts the system to obtain a screenshot for analysis.</text:span></text:p>
      <text:p text:style-name="P18">• <text:span text:style-name="T7">Dataset Details:</text:span><text:span text:style-name="T6"> The primary source is the </text:span><text:span text:style-name="T7">Exclusively Dark (ExDark)</text:span><text:span text:style-name="T6"> dataset, containing 7,363 images ranging from near-zero lux to partially dark. It also incorporates images from the </text:span><text:span text:style-name="T7">5G Wales Unlocked project</text:span><text:span text:style-name="T6"> and public databases like MS COCO and Stanford.</text:span></text:p>
      <text:p text:style-name="P18">• <text:span text:style-name="T7">Training Approach:</text:span><text:span text:style-name="T6"> The data was split into </text:span><text:span text:style-name="T7">90% training and 10% validation</text:span><text:span text:style-name="T6">. Feature engineering was used for the classifier, applying </text:span><text:span text:style-name="T7">Gabor filters and Sobel operators</text:span><text:span text:style-name="T6"> to extract RGB-based information.</text:span></text:p>
      <text:p text:style-name="P18">• <text:span text:style-name="T7">Evaluation Metrics:</text:span><text:span text:style-name="T6"> Performance was measured using </text:span><text:span text:style-name="T7">Average Precision (AP)</text:span><text:span text:style-name="T6">, </text:span><text:span text:style-name="T7">mean Average Precision (mAP)</text:span><text:span text:style-name="T6">, inference speed, and ROC curves, alongside hardware metrics like </text:span><text:span text:style-name="T7">CPU/GPU usage, RAM consumption, and temperature</text:span><text:span text:style-name="T6">.</text:span></text:p>
      <text:p text:style-name="P14">7. Main Contributions</text:p>
      <text:p text:style-name="P18">• <text:span text:style-name="T6">Development of a </text:span><text:span text:style-name="T7">dynamic selection mechanism</text:span><text:span text:style-name="T6"> that avoids static enhancement assumptions by identifying the best model for specific noise and artifacts.</text:span></text:p>
      <text:p text:style-name="P18">• <text:span text:style-name="T6">Achieving an end-to-end response time of </text:span><text:span text:style-name="T7">nearly one second</text:span><text:span text:style-name="T6"> for classification, enhancement, and detection entirely on the edge, compared to 12 seconds in hybrid cloud models.</text:span></text:p>
      <text:p text:style-name="P18">• <text:span text:style-name="T6">Demonstrating an accuracy boost of </text:span><text:span text:style-name="T7">more than 20%</text:span><text:span text:style-name="T6"> in object detection by implementing enhancement as a necessary preprocessing stage.</text:span></text:p>
      <text:p text:style-name="P14">8. Limitations</text:p>
      <text:p text:style-name="P18">• <text:span text:style-name="T7">Label Inadequacy:</text:span><text:span text:style-name="T6"> The performance evaluation is impacted by </text:span><text:span text:style-name="T7">missing or unlabelled objects</text:span><text:span text:style-name="T6"> in the ground truth data of existing datasets.</text:span></text:p>
      <text:p text:style-name="P18">• <text:span text:style-name="T7">Data Scarcity:</text:span><text:span text:style-name="T6"> There were a limited number of unique images that significantly outperformed specific enhancement models, which constrained the training of the dynamic classifier.</text:span></text:p>
      <text:p text:style-name="P18">• <text:span text:style-name="T7">Geographic Scope:</text:span><text:span text:style-name="T6"> The study was limited to </text:span><text:span text:style-name="T7">representative smart city environments</text:span><text:span text:style-name="T6"> and lacked a broader, global logistical examination.</text:span></text:p>
      <text:p text:style-name="P11"><text:span text:style-name="T3"/></text:p>
      <text:p text:style-name="P12"><text:span text:style-name="T3">3.2 </text:span><text:span text:style-name="T1">Batzner, K., Heckler, L., &amp; König, R. (2023). EfficientAD: Accurate Visual Anomaly Detection at Millisecond-Level Latencies. Proceedings of the IEEE/CVF Conference on Computer Vision and Pattern Recognition (CVPR).</text:span>,</text:p>
      <text:p text:style-name="P2"><text:span text:style-name="T1">1. Full Citation Details</text:span> Batzner, K., Heckler, L., &amp; König, R. (2023). <text:span text:style-name="T1">EfficientAD: Accurate Visual Anomaly Detection at Millisecond-Level Latencies</text:span>. <text:span text:style-name="T5">Proceedings of the IEEE/CVF Conference on Computer Vision and Pattern Recognition (CVPR)</text:span>.,</text:p>
      <text:p text:style-name="P2"><text:span text:style-name="T1">2. The Edge-Related or Deployment Problem Addressed</text:span> The paper addresses the trend where state-of-the-art anomaly detection models sacrifice computational efficiency for higher performance by using large backbones, ensembling, and high-resolution inputs. Such models are often unsuitable for deployment in environments with <text:span text:style-name="T1">strict runtime limits</text:span> or where high production rates demand low latency to prevent economic damage or ensure human safety.</text:p>
      <text:p text:style-name="P2"><text:span text:style-name="T1">3. Application Context</text:span> The primary context is <text:span text:style-name="T1">industrial anomaly detection</text:span>, specifically targeting both structural anomalies (e.g., stains or scratches) and logical anomalies (e.g., invalid combinations or ordering of objects),. Real-world examples include monitoring combine harvesters for foreign objects or protecting machine operators from hazardous blades.</text:p>
      <text:p text:style-name="P2"><text:span text:style-name="T1">4. Hardware or Resource Assumptions</text:span> The methodology assumes the use of <text:span text:style-name="T1">modern GPUs</text:span> for optimal performance, with evaluations conducted on NVIDIA RTX A6000, A5000, Tesla V100, RTX 3080, and RTX 2080 Ti,,. It prioritizes models with a <text:span text:style-name="T1">low memory footprint</text:span> and high throughput (600+ images per second) to remain economically viable for industrial settings,.</text:p>
      <text:p text:style-name="P13">5. Optimization or Efficiency Techniques Used</text:p>
      <text:p text:style-name="P17">• <text:span text:style-name="T7">Lightweight Architecture:</text:span><text:span text:style-name="T6"> Uses a Patch Description Network (PDN) with only four convolutional layers and early downsampling via average-pooling,.</text:span></text:p>
      <text:p text:style-name="P17">• <text:span text:style-name="T7">Knowledge Distillation:</text:span><text:span text:style-name="T6"> Distills a deep pretrained backbone (WideResNet-101) into the lightweight teacher PDN,.</text:span></text:p>
      <text:p text:style-name="P17">• <text:span text:style-name="T7">Loss-Induced Asymmetry:</text:span><text:span text:style-name="T6"> Introduces a specialized training loss that prevents the student from imitating the teacher on out-of-distribution data, improving detection without increasing test-time computational cost,.</text:span></text:p>
      <text:p text:style-name="P17">• <text:span text:style-name="T7">Shared Hidden Layers:</text:span><text:span text:style-name="T6"> Integrates an autoencoder with the student-teacher pair by sharing hidden layers to minimize redundant computations.</text:span></text:p>
      <text:p text:style-name="P17">• <text:span text:style-name="T7">Precision Optimization:</text:span><text:span text:style-name="T6"> Supports </text:span><text:span text:style-name="T7">float16 precision</text:span><text:span text:style-name="T6"> for inference to further reduce latency and memory usage.</text:span></text:p>
      <text:p text:style-name="P2"><text:span text:style-name="T1">6. Consideration of Latency, Power, or Real-Time Constraints</text:span> EfficientAD is specifically engineered for <text:span text:style-name="T1">millisecond-level latencies</text:span>, achieving approximately <text:span text:style-name="T1">2 ms per image</text:span> on an RTX A6000,. This high throughput and low latency are designed to meet the strict real-time requirements of high-speed industrial production lines,.</text:p>
      <text:p text:style-name="P2"><text:soft-page-break/><text:span text:style-name="T1">7. Offline vs. Online Operation Assumptions</text:span> The model assumes <text:span text:style-name="T1">offline training</text:span> on a dataset of only "normal" (anomaly-free) images to learn the distribution,. During <text:span text:style-name="T1">online inference</text:span>, the system calculates anomaly scores in real-time by identifying features that the student network fails to predict correctly,.</text:p>
      <text:p text:style-name="P13">8. Main Contributions Related to Edge Intelligence</text:p>
      <text:p text:style-name="P17">• <text:span text:style-name="T6">Development of an </text:span><text:span text:style-name="T7">efficient feature extractor</text:span><text:span text:style-name="T6"> that processes images in less than 800 µs,.</text:span></text:p>
      <text:p text:style-name="P17">• <text:span text:style-name="T6">Providing a model that sets new standards for the </text:span><text:span text:style-name="T7">trade-off between accuracy and latency</text:span><text:span text:style-name="T6">, outperforming complex models like AST and PatchCore while being significantly faster,.</text:span></text:p>
      <text:p text:style-name="P17">• <text:span text:style-name="T6">A scalable solution that remains accurate for both </text:span><text:span text:style-name="T7">local (structural) and global (logical)</text:span><text:span text:style-name="T6"> anomalies while maintaining a small parameter footprint (approx. 8M for the S variant),.</text:span></text:p>
      <text:p text:style-name="P13">9. Limitations or Deployment Challenges Discussed</text:p>
      <text:p text:style-name="P17">• <text:span text:style-name="T7">Hardware Dependency:</text:span><text:span text:style-name="T6"> While EfficientAD is the fastest on all tested hardware, its millisecond-level speeds rely on GPU parallelization; its Lack of CPU-specific benchmarks is noted,.</text:span></text:p>
      <text:p text:style-name="P17">• <text:span text:style-name="T7">Contextual Sensitivity:</text:span><text:span text:style-name="T6"> While the model handles logical anomalies, its response strength on highly complex logical constraints (e.g., specific packaging scenarios) still has room for improvement.</text:span></text:p>
      <text:p text:style-name="P17">• <text:span text:style-name="T7">Training Overhead:</text:span><text:span text:style-name="T6"> Although inference is lightweight, the initial distillation process requires access to a larger, more resource-intensive pretrained classification backbone,.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5T15:00:12.367772643</dc:date>
    <meta:editing-duration>PT10M24S</meta:editing-duration>
    <meta:editing-cycles>1</meta:editing-cycles>
    <meta:document-statistic meta:table-count="1" meta:image-count="0" meta:object-count="0" meta:page-count="10" meta:paragraph-count="128" meta:word-count="3363" meta:character-count="25004" meta:non-whitespace-character-count="21775"/>
  </office:meta>
</office:document-meta>
</file>