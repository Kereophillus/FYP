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AAD8088D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11.25cm" fo:min-width="7.4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opacity="0%" draw:fill-color="#729fcf" draw:opacity="68%" draw:textarea-horizontal-align="justify" draw:textarea-vertical-align="middle" draw:auto-grow-height="false" fo:min-height="11.642cm" fo:min-width="8cm" loext:decorative="false"/>
    </style:style>
    <style:style style:name="gr4" style:family="graphic" style:parent-style-name="standard">
      <style:graphic-properties draw:fill-color="#b7b3ca" draw:textarea-horizontal-align="justify" draw:textarea-vertical-align="middle" draw:auto-grow-height="false" fo:min-height="11.25cm" fo:min-width="7.75cm" loext:decorative="false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 draw:opacity="68%"/>
      <style:paragraph-properties fo:text-align="center"/>
    </style:style>
    <style:style style:name="P4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cm" svg:height="11.5cm" svg:x="1.35cm" svg:y="5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622cm" svg:height="8.369cm" draw:transform="skewX (0.000698131700797732) rotate (-1.56713113536571) translate (19.196cm 4.303cm)">
          <draw:image xlink:href="Pictures/1000000000000129000000AAD8088DB2.jpg" xlink:type="simple" xlink:show="embed" xlink:actuate="onLoad" draw:mime-type="image/jpeg">
            <text:p/>
          </draw:image>
        </draw:frame>
        <draw:custom-shape draw:style-name="gr3" draw:text-style-name="P3" draw:layer="layout" svg:width="8.5cm" svg:height="11.892cm" svg:x="10.9cm" svg:y="5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cm" svg:height="11.5cm" svg:x="20.25cm" svg:y="5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5:32:51.237978573</meta:creation-date>
    <meta:editing-duration>PT9M31S</meta:editing-duration>
    <meta:editing-cycles>2</meta:editing-cycles>
    <meta:generator>LibreOffice/24.2.7.2$Linux_X86_64 LibreOffice_project/420$Build-2</meta:generator>
    <dc:date>2026-02-19T15:42:20.442003464</dc:date>
    <meta:document-statistic meta:object-count="4"/>
  </office:meta>
</office:document-meta>
</file>